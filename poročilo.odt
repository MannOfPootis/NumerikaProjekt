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99b" officeooo:paragraph-rsid="001ec99b"/>
    </style:style>
    <style:style style:name="P2" style:family="paragraph" style:parent-style-name="Standard">
      <style:text-properties officeooo:rsid="00218a2a" officeooo:paragraph-rsid="00218a2a"/>
    </style:style>
    <style:style style:name="T1" style:family="text">
      <style:text-properties officeooo:rsid="001fd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za program sem uporabil eulerjevo metodo ker je najlažja za implementirati in ker če bi hotel biti učinkovit sploh nebi numerično reševal diferecialnih enačb ampak programsko analitično določil trajektorije.</text:span></text:p>
      <text:p text:style-name="P1"/>
      <text:p text:style-name="P2">1. odboj</text:p>
      <text:p text:style-name="P2">za delujučo simulacijo potrebujemo dobro definiran odboj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1T14:03:48.003793244</meta:creation-date>
    <dc:date>2026-05-11T20:57:36.982819121</dc:date>
    <meta:editing-duration>PT20M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38" meta:character-count="271" meta:non-whitespace-character-count="236"/>
  </office:meta>
</office:document-meta>
</file>